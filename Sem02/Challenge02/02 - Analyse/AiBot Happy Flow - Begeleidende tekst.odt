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1">
      <style:paragraph-properties fo:margin-left="0.5in" fo:margin-right="0in" fo:text-indent="0in" style:auto-text-indent="false" fo:margin-top="0in" fo:margin-bottom="0in"/>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2">
      <style:paragraph-properties fo:margin-left="0.5in" fo:margin-right="0in" fo:text-indent="0in" style:auto-text-indent="false"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Text_20_body" style:list-style-name="L3">
      <style:paragraph-properties fo:margin-top="0in" fo:margin-bottom="0in"/>
    </style:style>
  </office:automatic-styles>
  <office:body>
    <office:text>
      <text:h text:style-name="Heading_20_2" text:outline-level="2"><text:bookmark-start text:name="metadata"/>Metadata<text:bookmark-end text:name="metadata"/></text:h>
      <text:p text:style-name="First_20_paragraph"><text:span text:style-name="T1">Author: </text:span> Bram Wieringa <text:span text:style-name="T1">Date: </text:span> 11-05-2026 <text:span text:style-name="T1">Version: </text:span> 1.0 <text:span text:style-name="T1">Dependencies: </text:span> - Leefstijlroer van Vereniging Arts en Leefstijl - HappyFlow.bpmn versie 1.2</text:p>
      <text:h text:style-name="Heading_20_2" text:outline-level="2"><text:bookmark-start text:name="begroeting-en-voorstellen"/>1. Begroeting en voorstellen<text:bookmark-end text:name="begroeting-en-voorstellen"/></text:h>
      <text:p text:style-name="P1"><text:span text:style-name="T1">Chatbot:</text:span> Hallo! Welkom bij Stichting Richter Education. Mijn naam is Knoopje, de digitale assistent. Ik help je om te ontdekken welke activiteiten bij jou passen, op het gebied van gezondheid en welzijn, in de buurt van Boxtel.</text:p>
      <text:p text:style-name="P1">Ons gesprek is anoniem. Je hoeft geen naam of andere gegevens in te vullen.</text:p>
      <text:p text:style-name="P1">Mag ik je een paar vragen stellen? Dan zoek ik daarna drie activiteiten voor je uit.</text:p>
      <text:h text:style-name="Heading_20_2" text:outline-level="2"><text:bookmark-start text:name="instappunt-bepalen"/>2. Instappunt bepalen<text:bookmark-end text:name="instappunt-bepalen"/></text:h>
      <text:p text:style-name="P2"><text:span text:style-name="T1">Chatbot:</text:span> Weet je al wat je zou willen doen?</text:p>
      <text:p text:style-name="P2">🔘 Ja, ik weet precies wat ik wil 🔘 Ik heb wel een idee, maar weet het niet zeker 🔘 Nee, ik weet het nog niet</text:p>
      <text:p text:style-name="First_20_paragraph"><text:span text:style-name="T2">→ Bij </text:span>“<text:span text:style-name="T2">ja, ik weet het precies</text:span>”<text:span text:style-name="T2">: sla de verkenning over en ga direct naar matching.</text:span> <text:span text:style-name="T2">→ Bij </text:span>“<text:span text:style-name="T2">ik heb een idee</text:span>”<text:span text:style-name="T2">: stel alleen de meest relevante pijlervragen.</text:span> <text:span text:style-name="T2">→ Bij </text:span>“<text:span text:style-name="T2">nee</text:span>”<text:span text:style-name="T2">: doorloop het volledige gesprek hieronder.</text:span></text:p>
      <text:h text:style-name="Heading_20_2" text:outline-level="2"><text:bookmark-start text:name="beweging"/>3. Beweging<text:bookmark-end text:name="beweging"/></text:h>
      <text:h text:style-name="Heading_20_3" text:outline-level="3"><text:bookmark-start text:name="a.-slider"/>3a. Slider<text:bookmark-end text:name="a.-slider"/></text:h>
      <text:p text:style-name="P3"><text:span text:style-name="T1">Chatbot:</text:span> Laten we beginnen met bewegen.</text:p>
      <text:p text:style-name="P3">Beweeg je genoeg? Klik op de lijn waar jij jezelf zou plaatsen. :( ————————————————— ☺*’ (helemaal niet) (meer dan genoeg)</text:p>
      <text:p text:style-name="First_20_paragraph">*’ Bij een klik op de slider berekenen we de afstand in percentage. Dit kan op twee manieren: gemeten vanaf de :( of vanaf de :). De definitieve keuze tussen deze twee opties moet nog worden gemaakt.</text:p>
      <text:h text:style-name="Heading_20_3" text:outline-level="3"><text:bookmark-start text:name="b.-motivatievragen-en-voorkeuren"/>3b. Motivatievragen en voorkeuren<text:bookmark-end text:name="b.-motivatievragen-en-voorkeuren"/></text:h>
      <text:p text:style-name="P4"><text:span text:style-name="T1">Chatbot:</text:span> Dank je wel.</text:p>
      <text:p text:style-name="P4">Als score laag: Hoe komt het dat bewegen lastig is voor jou?</text:p>
      <text:p text:style-name="P4">Altijd stellen: Beweeg je liever binnen of buiten? 🔘 Binnen 🔘 Buiten 🔘 Maakt me niet uit</text:p>
      <text:p text:style-name="P4">Doe je liever iets alleen of samen met anderen? 🔘 Alleen 🔘 In een groep 🔘 Maakt me niet uit</text:p>
      <text:p text:style-name="P4">Heb je lichamelijke beperkingen waarmee we rekening moeten houden? (Denk aan moeite met lopen, pijn, of gebruik van een rolstoel.) 🔘 Ja 🔘 Nee</text:p>
      <text:p text:style-name="First_20_paragraph"><text:span text:style-name="T2">→ Sla het bij </text:span>“<text:span text:style-name="T2">ja</text:span>”<text:span text:style-name="T2"> op als filter: geen activiteiten met intensief lopen, traplopen, etc.</text:span></text:p>
      <text:h text:style-name="Heading_20_2" text:outline-level="2"><text:bookmark-start text:name="voeding"/>4. Voeding<text:bookmark-end text:name="voeding"/></text:h>
      <text:h text:style-name="Heading_20_3" text:outline-level="3"><text:bookmark-start text:name="a.-slider-1"/>4a. Slider<text:bookmark-end text:name="a.-slider-1"/></text:h>
      <text:p text:style-name="P5"><text:span text:style-name="T1">Chatbot:</text:span> Nu voeding.</text:p>
      <text:p text:style-name="P5">Eet je elke dag gezond, vers en gevarieerd? :( ————————————————— ☺</text:p>
      <text:h text:style-name="Heading_20_3" text:outline-level="3"><text:bookmark-start text:name="b.-motivatievragen-en-voorkeuren-1"/>4b. Motivatievragen en voorkeuren<text:bookmark-end text:name="b.-motivatievragen-en-voorkeuren-1"/></text:h>
      <text:p text:style-name="P6"><text:span text:style-name="T1">Chatbot:</text:span> Zijn er dingen die het moeilijk maken om gezond te eten?</text:p>
      <text:p text:style-name="P6">Kook je zelf? 🔘 Ja, bijna altijd 🔘 Soms 🔘 Zelden of nooit</text:p>
      <text:p text:style-name="P6">Heb je dieetwensen of allergieën? 🔘 Ja 🔘 Nee</text:p>
      <text:p text:style-name="First_20_paragraph"><text:span text:style-name="T2">→ Bij </text:span>“<text:span text:style-name="T2">ja op dieet/allergieën</text:span>”<text:span text:style-name="T2">: sla op als filter voor activiteiten rondom koken/voeding.</text:span></text:p>
      <text:h text:style-name="Heading_20_2" text:outline-level="2"><text:bookmark-start text:name="ontspanning"/>5. Ontspanning<text:bookmark-end text:name="ontspanning"/></text:h>
      <text:h text:style-name="Heading_20_3" text:outline-level="3"><text:bookmark-start text:name="a.-slider-2"/>5a. Slider<text:bookmark-end text:name="a.-slider-2"/></text:h>
      <text:p text:style-name="P7"><text:span text:style-name="T1">Chatbot:</text:span> En ontspanning.</text:p>
      <text:p text:style-name="P7">Kun je goed ontspannen en voel je je lekker in je hoofd? :( ————————————————— ☺</text:p>
      <text:h text:style-name="Heading_20_3" text:outline-level="3"><text:bookmark-start text:name="b.-motivatievragen-en-voorkeuren-2"/>5b. Motivatievragen en voorkeuren<text:bookmark-end text:name="b.-motivatievragen-en-voorkeuren-2"/></text:h>
      <text:p text:style-name="P8"><text:span text:style-name="T1">Chatbot:</text:span> Wat doe je al om te ontspannen? Hebt u een hobby?</text:p>
      <text:p text:style-name="P8">Als score laag: Merk je dat piekeren of stress een rol speelt? 🔘 Ja 🔘 Nee 🔘 Weet ik niet</text:p>
      <text:p text:style-name="P8">Heb je voorkeur voor rust of juist activiteit bij ontspanning? 🔘 Rustige dingen (bijv. mediteren, natuur, lezen) 🔘 Actieve dingen (bijv. sport, creatief bezig zijn) 🔘 Geen voorkeur</text:p>
      <text:h text:style-name="Heading_20_2" text:outline-level="2"><text:bookmark-start text:name="verbinding"/>6. Verbinding<text:bookmark-end text:name="verbinding"/></text:h>
      <text:h text:style-name="Heading_20_3" text:outline-level="3"><text:bookmark-start text:name="a.-slider-3"/>6a. Slider<text:bookmark-end text:name="a.-slider-3"/></text:h>
      <text:p text:style-name="P9"><text:span text:style-name="T1">Chatbot:</text:span> Dan verbinding — contact met mensen en zingeving.</text:p>
      <text:p text:style-name="P9">Ik krijg energie van mijn werk, hobby of de mensen om mij heen. :( ————————————————— ☺</text:p>
      <text:h text:style-name="Heading_20_3" text:outline-level="3"><text:bookmark-start text:name="b.-motivatievragen-en-voorkeuren-3"/>6b. Motivatievragen en voorkeuren<text:bookmark-end text:name="b.-motivatievragen-en-voorkeuren-3"/></text:h>
      <text:p text:style-name="P10"><text:span text:style-name="T1">Chatbot:</text:span> Voel je je weleens eenzaam of alleen? 🔘 Ja, regelmatig 🔘 Soms 🔘 Nee</text:p>
      <text:p text:style-name="P11">Doe je liever mee aan iets met een groep mensen, of vind je 1-op-1 contact fijner? 🔘 Groep 🔘 1-op-1 🔘 Maakt niet uit</text:p>
      <text:p text:style-name="First_20_paragraph"><text:span text:style-name="T2">→ Sla voorkeuren op als filter: groepsactiviteiten vs. individuele begeleiding.</text:span></text:p>
      <text:h text:style-name="Heading_20_2" text:outline-level="2"><text:bookmark-start text:name="slaap"/>7. Slaap<text:bookmark-end text:name="slaap"/></text:h>
      <text:h text:style-name="Heading_20_3" text:outline-level="3"><text:bookmark-start text:name="a.-slider-4"/>7a. Slider<text:bookmark-end text:name="a.-slider-4"/></text:h>
      <text:p text:style-name="P12"><text:span text:style-name="T1">Chatbot:</text:span> Hoe gaat het met slapen?</text:p>
      <text:p text:style-name="P12">Slaap je goed? :( ————————————————— ☺</text:p>
      <text:h text:style-name="Heading_20_3" text:outline-level="3"><text:bookmark-start text:name="b.-motivatievragen-en-voorkeuren-4"/>7b. Motivatievragen en voorkeuren<text:bookmark-end text:name="b.-motivatievragen-en-voorkeuren-4"/></text:h>
      <text:p text:style-name="P13"><text:span text:style-name="T1">Chatbot:</text:span> Als score laag: Heb je moeite met inslapen, doorslapen, of word je te vroeg wakker?</text:p>
      <text:p text:style-name="P13">Werk je ook ’s avonds of ’s nachts? 🔘 Ja 🔘 Nee</text:p>
      <text:p text:style-name="First_20_paragraph"><text:span text:style-name="T2">→ Bij nachtdienst: filter activiteiten op tijdstip (geen vroege ochtendactiviteiten aanbieden).</text:span></text:p>
      <text:h text:style-name="Heading_20_2" text:outline-level="2"><text:bookmark-start text:name="middelen"/>8. Middelen<text:bookmark-end text:name="middelen"/></text:h>
      <text:h text:style-name="Heading_20_3" text:outline-level="3"><text:bookmark-start text:name="a.-slider-5"/>8a. Slider<text:bookmark-end text:name="a.-slider-5"/></text:h>
      <text:p text:style-name="P14"><text:span text:style-name="T1">Chatbot:</text:span> Tot slot: middelen — zoals roken, alcohol of medicatie.</text:p>
      <text:p text:style-name="P14">Gebruik je geen of weinig verslavende middelen? :( ————————————————— ☺</text:p>
      <text:h text:style-name="Heading_20_3" text:outline-level="3"><text:bookmark-start text:name="b.-motivatievragen-en-voorkeuren-5"/>8b. Motivatievragen en voorkeuren<text:bookmark-end text:name="b.-motivatievragen-en-voorkeuren-5"/></text:h>
      <text:p text:style-name="P15"><text:span text:style-name="T1">Chatbot:</text:span> Als score laag: Zou je hier iets aan willen veranderen? 🔘 Ja 🔘 Nee 🔘 Weet ik nog niet</text:p>
      <text:p text:style-name="First_20_paragraph"><text:span text:style-name="T2">→ Bij </text:span>“<text:span text:style-name="T2">ja</text:span>”<text:span text:style-name="T2">: neem </text:span>‘<text:span text:style-name="T2">middelen</text:span>’<text:span text:style-name="T2"> mee als zoekterm voor activiteiten (stoppenmetroken, alcoholhulp).</text:span></text:p>
      <text:h text:style-name="Heading_20_2" text:outline-level="2"><text:bookmark-start text:name="samenvatten"/>9. Samenvatten<text:bookmark-end text:name="samenvatten"/></text:h>
      <text:p text:style-name="P16"><text:span text:style-name="T1">Chatbot:</text:span> Dank je wel voor je antwoorden. Ik vat even samen wat je hebt verteld:</text:p>
      <text:list text:style-name="L1">
        <text:list-item>
          <text:p text:style-name="P17">Bewegen: je scoort jezelf [laag/gemiddeld/hoog], je beweegt liever [binnen/buiten], [alleen/in een groep].</text:p>
        </text:list-item>
        <text:list-item>
          <text:p text:style-name="P17">Voeding: je scoort jezelf [laag/gemiddeld/hoog].</text:p>
        </text:list-item>
        <text:list-item>
          <text:p text:style-name="P17">Ontspanning: je scoort jezelf [laag/gemiddeld/hoog], voorkeur voor [rust/activiteit].</text:p>
        </text:list-item>
        <text:list-item>
          <text:p text:style-name="P17">Verbinding: je scoort jezelf [laag/gemiddeld/hoog].</text:p>
        </text:list-item>
        <text:list-item>
          <text:p text:style-name="P17">Slaap: je scoort jezelf [laag/gemiddeld/hoog].</text:p>
        </text:list-item>
        <text:list-item>
          <text:p text:style-name="P17">Middelen: je scoort jezelf [laag/gemiddeld/hoog].</text:p>
        </text:list-item>
      </text:list>
      <text:p text:style-name="P16">Klopt dit? Of wil je iets aanpassen? 🔘 Ja, dit klopt 🔘 Nee, ik wil iets aanpassen</text:p>
      <text:h text:style-name="Heading_20_2" text:outline-level="2"><text:bookmark-start text:name="accountcreatie"/>10. Accountcreatie<text:bookmark-end text:name="accountcreatie"/></text:h>
      <text:p text:style-name="P18"><text:span text:style-name="T1">Chatbot:</text:span> Wil je je resultaten bewaren? Dan kun je een account aanmaken. Je kunt ook gewoon doorgaan zonder account.</text:p>
      <text:p text:style-name="P18">🔘 Ja, ik maak een account aan 🔘 Nee, ik ga verder zonder account</text:p>
      <text:p text:style-name="First_20_paragraph"><text:span text:style-name="T2">→ Bij </text:span>“<text:span text:style-name="T2">nee</text:span>”<text:span text:style-name="T2">: sla stap over en ga direct naar de drie suggesties.</text:span></text:p>
      <text:p text:style-name="Text_20_body"><text:span text:style-name="T2">→ Bij </text:span>“<text:span text:style-name="T2">ja</text:span>”<text:span text:style-name="T2">:</text:span></text:p>
      <text:h text:style-name="Heading_20_3" text:outline-level="3"><text:bookmark-start text:name="b.-accountcreatie"/>10b. Accountcreatie<text:bookmark-end text:name="b.-accountcreatie"/></text:h>
      <text:p text:style-name="P19"><text:span text:style-name="T1">Chatbot:</text:span> Vul je gegevens in:</text:p>
      <text:list text:style-name="L2">
        <text:list-item>
          <text:p text:style-name="P20">Naam: ________________</text:p>
        </text:list-item>
        <text:list-item>
          <text:p text:style-name="P20">Leeftijd: ________________</text:p>
        </text:list-item>
        <text:list-item>
          <text:p text:style-name="P20">Geslacht: 🔘 Man 🔘 Vrouw 🔘 Anders 🔘 Zeg ik liever niet</text:p>
        </text:list-item>
        <text:list-item>
          <text:p text:style-name="P20">E-mailadres: ________________</text:p>
        </text:list-item>
        <text:list-item>
          <text:p text:style-name="P20">Adres: ________________</text:p>
        </text:list-item>
      </text:list>
      <text:p text:style-name="P19">Je gegevens worden veilig opgeslagen en alleen gebruikt om je resultaten te bewaren en een evaluatie in te plannen.</text:p>
      <text:p text:style-name="P21"><text:span text:style-name="T1">Chatbot:</text:span> Je account is aangemaakt. We gaan nu verder met je activiteiten zoeken!</text:p>
      <text:h text:style-name="Heading_20_2" text:outline-level="2"><text:bookmark-start text:name="drie-suggesties-weergeven"/>11. Drie suggesties weergeven<text:bookmark-end text:name="drie-suggesties-weergeven"/></text:h>
      <text:p text:style-name="P22"><text:span text:style-name="T1">Chatbot:</text:span> Op basis van jouw antwoorden heb ik drie activiteiten gevonden die bij jou passen:</text:p>
      <text:p text:style-name="P22"><text:span text:style-name="T1">1. [Naam activiteit]</text:span> 📍 [Locatie, Boxtel] | 🕐 [Tijdstip] | 💶 [Kosten] [Korte omschrijving in 1-2 zinnen]</text:p>
      <text:p text:style-name="P22"><text:span text:style-name="T1">2. [Naam activiteit]</text:span> 📍 [Locatie] | 🕐 [Tijdstip] | 💶 [Kosten] [Korte omschrijving]</text:p>
      <text:p text:style-name="P22"><text:span text:style-name="T1">3. [Naam activiteit]</text:span> 📍 [Locatie] | 🕐 [Tijdstip] | 💶 [Kosten] [Korte omschrijving]</text:p>
      <text:p text:style-name="P22">Vind je een van deze activiteiten interessant? 🔘 Ja, ik wil meer weten of contact opnemen 🔘 Nee, geen van deze past bij mij</text:p>
      <text:h text:style-name="Heading_20_2" text:outline-level="2"><text:bookmark-start text:name="afsluiting"/>12. Afsluiting<text:bookmark-end text:name="afsluiting"/></text:h>
      <text:p text:style-name="P23"><text:span text:style-name="T1">Chatbot:</text:span> Bedankt! We wensen je veel succes. Je kunt dit gesprek altijd opnieuw starten als je andere activiteiten wilt zoeken.</text:p>
      <text:p text:style-name="P23">Tot ziens! 👋</text:p>
      <text:h text:style-name="Heading_20_2" text:outline-level="2"><text:bookmark-start text:name="notities-voor-het-team"/>Notities voor het team<text:bookmark-end text:name="notities-voor-het-team"/></text:h>
      <text:list text:style-name="L3">
        <text:list-item>
          <text:p text:style-name="P24">Filterlogica: alle antwoorden uit de voorkeursvragen (binnen/buiten, alleen/groep, beperkingen, tijdstip) moeten worden opgeslagen als matchingvariabelen.</text:p>
        </text:list-item>
        <text:list-item>
          <text:p text:style-name="P24">De sliders leveren een score op (bijv. 0–100). Lage scores (&lt; 40) geven aanleiding tot een vervolgvraag; hoge scores (&gt; 70) mogen korter worden afgehandeld.</text:p>
        </text:list-item>
        <text:list-item>
          <text:p text:style-name="P24">De synthetische dataset moet per activiteit minimaal bevatten: naam, aanbieder, pijler(s), locatie, tijdstip, kosten, doelgroep (beperking ja/nee), binnen/buiten, individueel/groep.</text:p>
        </text:list-item>
        <text:list-item>
          <text:p text:style-name="P24">Taalniveau: alle tekst op B1. Geen jargon, korte zinnen, actieve werkwoorden.</text:p>
        </text:list-item>
      </text:list>
      <text:h text:style-name="Heading_20_2" text:outline-level="2"><text:bookmark-start text:name="bronvermelding"/>Bronvermelding<text:bookmark-end text:name="bronvermelding"/></text:h>
      <text:p text:style-name="First_20_paragraph">Vereniging Arts en Leefstijl. (2025). <text:span text:style-name="T2">Handleiding voor toepassing van het Leefstijlroer: Voor de zorgprofessional</text:span> (2e druk). Vereniging Arts en Leefstijl.</text:p>
      <text:p text:style-name="Text_20_body">Wieringa, B. (2026). <text:span text:style-name="T2">Happy Flow: AI-chatbot Sociaal Knooppunt</text:span> (Versie 1.2) [Intern projectdocument]. [Projectgroep Sociaal Knooppunt].</text:p>
      <text:p text:style-name="Text_20_body">Anthropic. (2026). <text:span text:style-name="T2">Claude</text:span> (claude-sonnet-4-6) [Large language model]. Geraadpleegd op 11 mei 2026, via https://www.claude.ai Gebruikt voor: het opstellen van de gesprektekst per pijler van de happy flow, inclusief motivatievragen, filterlogica, sliderformulering, accountcreatie en afslu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1</meta:generator>
    <dc:title/>
    <dc:description/>
    <dc:subject/>
    <meta:keyword/>
    <meta:initial-creator/>
    <dc:creator/>
    <meta:creation-date>2026-05-12T07:41:21Z</meta:creation-date>
    <dc:date>2026-05-12T07:41:21Z</dc:date>
  </office:meta>
</office:document-meta>
</file>